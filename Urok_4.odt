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1800000222090BB05B.png" manifest:media-type="image/png"/>
  <manifest:file-entry manifest:full-path="Pictures/100000000000056D000001E90CEFD170.png" manifest:media-type="image/png"/>
  <manifest:file-entry manifest:full-path="Pictures/10000001000009E80000053915FA6F0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text-properties officeooo:paragraph-rsid="0012bbb2"/>
    </style:style>
    <style:style style:name="P2" style:family="paragraph" style:parent-style-name="Standard">
      <style:text-properties officeooo:paragraph-rsid="002501a0"/>
    </style:style>
    <style:style style:name="P3" style:family="paragraph" style:parent-style-name="Standard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</style:style>
    <style:style style:name="P4" style:family="paragraph" style:parent-style-name="Standard">
      <style:paragraph-properties style:line-height-at-least="0.353cm" fo:text-align="start" style:justify-single-word="false" style:writing-mode="lr-tb">
        <style:tab-stops>
          <style:tab-stop style:position="0cm"/>
        </style:tab-stops>
      </style:paragraph-properties>
    </style:style>
    <style:style style:name="P5" style:family="paragraph" style:parent-style-name="Standard">
      <style:text-properties officeooo:rsid="002501a0" officeooo:paragraph-rsid="002501a0"/>
    </style:style>
    <style:style style:name="P6" style:family="paragraph" style:parent-style-name="Standard">
      <style:text-properties officeooo:rsid="002501a0" officeooo:paragraph-rsid="00263087"/>
    </style:style>
    <style:style style:name="P7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officeooo:rsid="002501a0" officeooo:paragraph-rsid="00263087"/>
    </style:style>
    <style:style style:name="P8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officeooo:rsid="002501a0" officeooo:paragraph-rsid="00263087"/>
    </style:style>
    <style:style style:name="P9" style:family="paragraph" style:parent-style-name="Heading_20_3">
      <style:text-properties style:font-name="Liberation Serif" fo:font-size="12pt" style:font-size-asian="12pt" style:font-size-complex="12pt"/>
    </style:style>
    <style:style style:name="P10" style:family="paragraph" style:parent-style-name="Standard" style:list-style-name="L1">
      <style:text-properties officeooo:paragraph-rsid="0023af5b"/>
    </style:style>
    <style:style style:name="P11" style:family="paragraph" style:parent-style-name="Standard" style:list-style-name="L1">
      <style:text-properties fo:font-weight="bold" officeooo:paragraph-rsid="0023af5b" style:font-weight-asian="bold" style:font-weight-complex="bold"/>
    </style:style>
    <style:style style:name="P12" style:family="paragraph" style:parent-style-name="Standard" style:list-style-name="L1">
      <style:text-properties fo:font-weight="bold" officeooo:rsid="0023af5b" officeooo:paragraph-rsid="0023af5b" style:font-weight-asian="bold" style:font-weight-complex="bold"/>
    </style:style>
    <style:style style:name="P13" style:family="paragraph" style:parent-style-name="Standard" style:list-style-name="L2">
      <style:text-properties fo:font-weight="bold" officeooo:rsid="002501a0" officeooo:paragraph-rsid="0027e5d0" style:font-weight-asian="bold" style:font-weight-complex="bold"/>
    </style:style>
    <style:style style:name="P14" style:family="paragraph" style:parent-style-name="Standard" style:list-style-name="L2" style:master-page-name="">
      <loext:graphic-properties draw:fill="none"/>
      <style:paragraph-properties fo:margin-left="0cm" fo:margin-right="0cm" fo:text-indent="-0.6cm" style:auto-text-indent="false" style:page-number="auto" fo:background-color="transparent"/>
      <style:text-properties fo:font-weight="bold" officeooo:rsid="002501a0" officeooo:paragraph-rsid="0027e5d0" style:font-weight-asian="bold" style:font-weight-complex="bold"/>
    </style:style>
    <style:style style:name="P15" style:family="paragraph" style:parent-style-name="Standard" style:list-style-name="L2">
      <style:text-properties officeooo:paragraph-rsid="002501a0"/>
    </style:style>
    <style:style style:name="P16" style:family="paragraph" style:parent-style-name="Standard">
      <style:text-properties officeooo:paragraph-rsid="002501a0"/>
    </style:style>
    <style:style style:name="P17" style:family="paragraph" style:parent-style-name="Text_20_body" style:list-style-name="L3">
      <style:text-properties style:font-name="Liberation Serif"/>
    </style:style>
    <style:style style:name="P18" style:family="paragraph" style:parent-style-name="Text_20_body">
      <style:text-properties style:font-name="Liberation Serif"/>
    </style:style>
    <style:style style:name="P19" style:family="paragraph" style:parent-style-name="Text_20_body" style:list-style-name="L6">
      <style:paragraph-properties fo:margin-top="0cm" fo:margin-bottom="0cm" style:contextual-spacing="false"/>
    </style:style>
    <style:style style:name="P20" style:family="paragraph" style:parent-style-name="Text_20_body">
      <style:text-properties fo:font-weight="normal" style:font-weight-asian="normal" style:font-weight-complex="normal"/>
    </style:style>
    <style:style style:name="P21" style:family="paragraph" style:parent-style-name="Text_20_body" style:list-style-name="L6">
      <style:paragraph-properties fo:margin-top="0cm" fo:margin-bottom="0cm" style:contextual-spacing="false"/>
      <style:text-properties fo:font-weight="normal" style:font-weight-asian="normal" style:font-weight-complex="normal"/>
    </style:style>
    <style:style style:name="P22" style:family="paragraph" style:parent-style-name="Text_20_body" style:list-style-name="L6">
      <style:text-properties fo:font-weight="normal" style:font-weight-asian="normal" style:font-weight-complex="normal"/>
    </style:style>
    <style:style style:name="P23" style:family="paragraph" style:parent-style-name="Text_20_body">
      <style:text-properties officeooo:paragraph-rsid="002501a0"/>
    </style:style>
    <style:style style:name="P24" style:family="paragraph" style:parent-style-name="Text_20_body" style:list-style-name="L13"/>
    <style:style style:name="P25" style:family="paragraph" style:parent-style-name="Text_20_body" style:list-style-name="L13">
      <style:paragraph-properties fo:margin-top="0cm" fo:margin-bottom="0cm" style:contextual-spacing="false"/>
    </style:style>
    <style:style style:name="T1" style:family="text">
      <style:text-properties officeooo:rsid="0012bbb2"/>
    </style:style>
    <style:style style:name="T2" style:family="text">
      <style:text-properties officeooo:rsid="00198669"/>
    </style:style>
    <style:style style:name="T3" style:family="text">
      <style:text-properties officeooo:rsid="001dbfb1"/>
    </style:style>
    <style:style style:name="T4" style:family="text">
      <style:text-properties officeooo:rsid="0023af5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501a0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8bee0" style:font-weight-asian="normal" style:font-weight-complex="normal"/>
    </style:style>
    <style:style style:name="T9" style:family="text">
      <style:text-properties officeooo:rsid="002be9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1"><text:span text:style-name="T1">Источник данных сайт iNaturalist </text:span><text:span text:style-name="T3">и свободный источник(гугл изображения)</text:span><text:span text:style-name="T1">. </text:span><text:span text:style-name="T2">Выборка состоит </text:span><text:span text:style-name="T3">из набора изображений и их аннотаций, поделённых на 3 класса blooming_hogweed </text:span><text:span text:style-name="T4">(1993 изображения)</text:span><text:span text:style-name="T3">, faded_hogweed</text:span><text:span text:style-name="T4">(1861 изображения)</text:span><text:span text:style-name="T3">, thickets_hogweed</text:span><text:span text:style-name="T4">(2590 изображения)</text:span><text:span text:style-name="T3">.</text:span></text:p>
          <text:p text:style-name="P10">Аннотации сделаны с помощью <text:span text:style-name="T4">labelImg в формате pascal voc.</text:span></text:p>
        </text:list-item>
      </text:list>
      <text:p text:style-name="P1"><draw:frame draw:style-name="fr1" draw:name="Изображение1" text:anchor-type="char" svg:x="0.609cm" svg:y="0.434cm" svg:width="16.365cm" svg:height="8.627cm" draw:z-index="0"><draw:image xlink:href="Pictures/10000001000009E80000053915FA6F06.png" xlink:type="simple" xlink:show="embed" xlink:actuate="onLoad" draw:mime-type="image/png"/></draw:frame><text:tab/>Пример кода анннотаций:</text:p>
      <text:p text:style-name="P1"><text:tab/><text:tab/>&lt;?xml version='1.0' encoding='utf-8'?&gt;</text:p>
      <text:p text:style-name="P1">&lt;annotation&gt;</text:p>
      <text:p text:style-name="P1"><text:tab/>&lt;folder&gt;train&lt;/folder&gt;</text:p>
      <text:p text:style-name="P1"><text:tab/>&lt;filename&gt;blooming_0000.jpg&lt;/filename&gt;</text:p>
      <text:p text:style-name="P1"><text:tab/>&lt;source&gt;</text:p>
      <text:p text:style-name="P1"><text:tab/><text:tab/>&lt;database&gt;Unknown&lt;/database&gt;</text:p>
      <text:p text:style-name="P1"><text:tab/>&lt;/source&gt;</text:p>
      <text:p text:style-name="P1"><text:tab/>&lt;size&gt;</text:p>
      <text:p text:style-name="P1"><text:tab/><text:tab/>&lt;width&gt;1024&lt;/width&gt;</text:p>
      <text:p text:style-name="P1"><text:tab/><text:tab/>&lt;height&gt;1024&lt;/height&gt;</text:p>
      <text:p text:style-name="P1"><text:tab/><text:tab/>&lt;depth&gt;3&lt;/depth&gt;</text:p>
      <text:p text:style-name="P1"><text:tab/>&lt;/size&gt;</text:p>
      <text:p text:style-name="P1"><text:tab/>&lt;segmented&gt;0&lt;/segmented&gt;</text:p>
      <text:p text:style-name="P1"><text:tab/>&lt;object&gt;</text:p>
      <text:p text:style-name="P1"><text:tab/><text:tab/>&lt;name&gt;blooming_sosnovsky&lt;/name&gt;</text:p>
      <text:p text:style-name="P1"><text:tab/><text:tab/>&lt;pose&gt;Unspecified&lt;/pose&gt;</text:p>
      <text:p text:style-name="P1"><text:tab/><text:tab/>&lt;truncated&gt;0&lt;/truncated&gt;</text:p>
      <text:p text:style-name="P1"><text:tab/><text:tab/>&lt;difficult&gt;0&lt;/difficult&gt;</text:p>
      <text:p text:style-name="P1"><text:tab/><text:tab/>&lt;bndbox&gt;</text:p>
      <text:p text:style-name="P1"><text:tab/><text:tab/><text:tab/>&lt;xmin&gt;9&lt;/xmin&gt;</text:p>
      <text:p text:style-name="P1"><text:tab/><text:tab/><text:tab/>&lt;ymin&gt;11&lt;/ymin&gt;</text:p>
      <text:p text:style-name="P1"><text:tab/><text:tab/><text:tab/>&lt;xmax&gt;974&lt;/xmax&gt;</text:p>
      <text:p text:style-name="P1"><text:tab/><text:tab/><text:tab/>&lt;ymax&gt;1016&lt;/ymax&gt;</text:p>
      <text:p text:style-name="P1"><text:tab/><text:tab/>&lt;/bndbox&gt;</text:p>
      <text:p text:style-name="P1"><text:tab/>&lt;/object&gt;</text:p>
      <text:p text:style-name="P1">&lt;/annotation&gt;</text:p>
      <text:list text:continue-numbering="true" text:style-name="L1">
        <text:list-item>
          <text:p text:style-name="P12"><text:soft-page-break/>На данный момент сделана аннотирована вся bloom_hogweed часть датасета, большая часть faded_hogweed и небольшая часть thickets_hogweed. Вот текущие графики по нормализованным данным:</text:p>
        </text:list-item>
      </text:list>
      <text:p text:style-name="P6"><draw:frame draw:style-name="fr1" draw:name="Изображение2" text:anchor-type="char" svg:x="-0.603cm" svg:y="0.291cm" svg:width="18.683cm" svg:height="6.576cm" draw:z-index="1"><draw:image xlink:href="Pictures/100000000000056D000001E90CEFD170.png" xlink:type="simple" xlink:show="embed" xlink:actuate="onLoad" draw:mime-type="image/png"/></draw:frame><draw:frame draw:style-name="fr1" draw:name="Изображение3" text:anchor-type="char" svg:x="1.746cm" svg:y="7.408cm" svg:width="14.182cm" svg:height="14.446cm" draw:z-index="2"><draw:image xlink:href="Pictures/100000000000021800000222090BB05B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P6"/>
      <text:p text:style-name="P6"/>
      <text:p text:style-name="P6"><text:tab/>Всего боксов: 9105</text:p>
      <text:p text:style-name="P6"/>
      <text:p text:style-name="P7"><text:soft-page-break/>Статистика для ширины:</text:p>
      <text:p text:style-name="P8"><text:s text:c="2"/>Мин: 0.0205</text:p>
      <text:p text:style-name="P8"><text:s text:c="2"/>Макс: 0.9995</text:p>
      <text:p text:style-name="P8"><text:s text:c="2"/>Среднее: 0.3041</text:p>
      <text:p text:style-name="P8"><text:s text:c="2"/>Медиана: 0.1958</text:p>
      <text:p text:style-name="P8"><text:s text:c="2"/>Стандартное отклонение: 0.2723</text:p>
      <text:p text:style-name="P8"/>
      <text:p text:style-name="P8">Статистика для высоты:</text:p>
      <text:p text:style-name="P8"><text:s text:c="2"/>Мин: 0.0240</text:p>
      <text:p text:style-name="P8"><text:s text:c="2"/>Макс: 0.9995</text:p>
      <text:p text:style-name="P8"><text:s text:c="2"/>Среднее: 0.3912</text:p>
      <text:p text:style-name="P8"><text:s text:c="2"/>Медиана: 0.2989</text:p>
      <text:p text:style-name="P8"><text:s text:c="2"/>Стандартное отклонение: 0.2678</text:p>
      <text:p text:style-name="P8"/>
      <text:p text:style-name="P5"><text:tab/>На данный момент ещё не была сделана полная аннотация и полные выводы о состоянии датасета.</text:p>
      <text:list text:style-name="L2">
        <text:list-header>
          <text:p text:style-name="P15"/>
          <text:p text:style-name="P13">3. Оценка качества разметки.</text:p>
          <text:list>
            <text:list-item>
              <text:list>
                <text:list-header>
                  <text:p text:style-name="P14"><text:span text:style-name="T7"><text:s text:c="12"/>На текущем этапе полностью размечен класс </text:span><text:span text:style-name="Strong_20_Emphasis"><text:span text:style-name="T7">blooming_hogweed</text:span></text:span><text:span text:style-name="T7">, большая часть изображений класса </text:span><text:span text:style-name="Strong_20_Emphasis"><text:span text:style-name="T7">faded_hogweed</text:span></text:span><text:span text:style-name="T7"> и небольшая часть класса </text:span><text:span text:style-name="Strong_20_Emphasis"><text:span text:style-name="T7">thickets_hogweed</text:span></text:span><text:span text:style-name="T7">. В связи с неполной разметкой итоговая оценка качества датасета носит предварительный характер.</text:span></text:p>
                </text:list-header>
              </text:list>
            </text:list-item>
          </text:list>
        </text:list-header>
      </text:list>
      <text:p text:style-name="P20"><text:tab/><text:tab/>По состоянию на данный момент:</text:p>
      <text:list text:style-name="L6">
        <text:list-item>
          <text:list>
            <text:list-item>
              <text:list>
                <text:list-item>
                  <text:p text:style-name="P19"><text:span text:style-name="T7">Общее количество размеченных объектов составляет </text:span><text:span text:style-name="Strong_20_Emphasis"><text:span text:style-name="T7">91</text:span></text:span><text:span text:style-name="Strong_20_Emphasis"><text:span text:style-name="T8">5</text:span></text:span><text:span text:style-name="Strong_20_Emphasis"><text:span text:style-name="T7">5 bounding boxes</text:span></text:span><text:span text:style-name="T7">, что является достаточным объёмом данных для обучения современных моделей детекции объектов. </text:span></text:p>
                </text:list-item>
                <text:list-item>
                  <text:p text:style-name="P21">Анализ распределения размеров объектов показывает наличие как крупных, так и мелких экземпляров борщевика: </text:p>
                  <text:list>
                    <text:list-item>
                      <text:p text:style-name="P21">средняя нормализованная ширина объекта — 0.304; </text:p>
                    </text:list-item>
                    <text:list-item>
                      <text:p text:style-name="P21">средняя нормализованная высота объекта — 0.391; </text:p>
                    </text:list-item>
                    <text:list-item>
                      <text:p text:style-name="P21">диапазон размеров близок к полному диапазону изображения (от 0.02 до 0.999).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">Наличие объектов различных масштабов положительно влияет на способность модели обобщать данные и обнаруживать растения на разных расстояниях. </text:p>
        </text:list-item>
        <text:list-item>
          <text:p text:style-name="P21">Предварительный анализ не выявил критических ошибок в структуре аннотаций (отрицательные координаты, выход боксов за границы изображения и др.). </text:p>
        </text:list-item>
        <text:list-item>
          <text:p text:style-name="P22">Однако окончательная оценка качества разметки может быть проведена только после завершения аннотирования всех классов и дополнительной проверки согласованности границ объектов. </text:p>
        </text:list-item>
      </text:list>
      <text:p text:style-name="Text_20_body"><text:span text:style-name="Strong_20_Emphasis"><text:span text:style-name="T7"><text:tab/>Предварительный вывод:</text:span></text:span><text:span text:style-name="T7"> текущая разметка имеет удовлетворительное качество и достаточный объём для начала экспериментов по обучению модели, однако для получения объективных метрик требуется завершение разметки всего датасета и проведение финального аудита аннотаций.</text:span></text:p>
      <text:p text:style-name="P2"><text:tab/></text:p>
      <text:p text:style-name="P23"><text:span text:style-name="T6"><text:tab/>4. </text:span><text:span text:style-name="T5">Описанием алгоритма формирования выборки для решения задачи и стратегии валидации:</text:span></text:p>
      <text:p text:style-name="P23"><text:span text:style-name="T7"><text:tab/>Подготовка данных выполняется в несколько этапов:</text:span></text:p>
      <text:list text:style-name="L3">
        <text:list-item>
          <text:p text:style-name="P17"><text:soft-page-break/>Загрузка изображений и соответствующих .xml.</text:p>
        </text:list-item>
        <text:list-item>
          <text:p text:style-name="P17">Динамическая аугментация и нормализация.</text:p>
        </text:list-item>
        <text:list-item>
          <text:p text:style-name="P17">Приведение изображения к нужному размеру, поворот зеркально по горизонтали с вероятностью 50%.</text:p>
        </text:list-item>
        <text:list-item>
          <text:p text:style-name="P17">Нормализация изображения (деление на 255.0) для правильной подачи в модель — <text:tab/>переводит в диапазон [0.0, 1.0].</text:p>
        </text:list-item>
      </text:list>
      <text:p text:style-name="P18"/>
      <text:h text:style-name="P9" text:outline-level="3"><text:tab/>Стратегия разделения данных:</text:h>
      <text:p text:style-name="Text_20_body"><text:tab/>Для обучения и оценки модели планируется использовать следующее разделение:</text:p>
      <text:list text:style-name="L13">
        <text:list-item>
          <text:list>
            <text:list-item>
              <text:p text:style-name="P25">обучающая выборка (Train) — 60%; </text:p>
            </text:list-item>
            <text:list-item>
              <text:p text:style-name="P25">валидационная выборка (Validation) — 25%; </text:p>
            </text:list-item>
            <text:list-item>
              <text:p text:style-name="P24">тестовая выборка (Test) — 15%. </text:p>
            </text:list-item>
          </text:list>
        </text:list-item>
      </text:list>
      <text:p text:style-name="Text_20_body"><text:tab/>Разделение датасета выполняется на уровне изображений. Перед разбиением осуществляется случайное перемешивание (random shuffle) с фиксированным значением random seed, что обеспечивает воспроизводимость экспериментов и снижает риск смещения выборки.</text:p>
      <text:p text:style-name="Text_20_body"><text:tab/>Поскольку в одной изображении может присутствовать несколько объектов разных классов, дополнительно рассматривается подход стратифицированного разбиения по наличию классов (multi-label stratified split). Данный метод позволяет более равномерно распределить изображения с разными комбинациями классов между обучающей, валидационной и тестовой выборками.</text:p>
      <text:p text:style-name="Text_20_body"><text:tab/>Во время обучения дополнительно применяется перемешивание обучающей выборки перед каждой эпохой, что снижает риск переобучения и улучшает сходимость модели.</text:p>
      <text:p text:style-name="Text_20_body"/>
      <text:p text:style-name="P18"/>
      <text:p text:style-name="P4"/>
      <text:p text:style-name="P3"/>
      <text:p text:style-name="P3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Объект_20_без_20_заливки" style:display-name="Объект без заливки" style:family="paragraph" style:parent-style-name="Standard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roboto" style:font-family-complex="roboto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ёный" style:display-name="Контур зелё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Титульная_20_страница_7e_LT_7e_Gliederung_20_1" style:display-name="Титульная страница~LT~Gliederung 1" style:family="paragraph">
      <style:paragraph-properties fo:margin-top="0.499cm" fo:margin-bottom="0cm" style:contextual-spacing="false" style:line-height-at-least="0cm" fo:text-align="start" style:justify-single-word="false" style:writing-mode="lr-tb"/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Титульная_20_страница_7e_LT_7e_Gliederung_20_2" style:display-name="Титульная страница~LT~Gliederung 2" style:family="paragraph" style:parent-style-name="Титульная_20_страница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ая_20_страница_7e_LT_7e_Gliederung_20_3" style:display-name="Титульная страница~LT~Gliederung 3" style:family="paragraph" style:parent-style-name="Титульная_20_страница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ьная_20_страница_7e_LT_7e_Gliederung_20_4" style:display-name="Титульная страница~LT~Gliederung 4" style:family="paragraph" style:parent-style-name="Титульная_20_страница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ьная_20_страница_7e_LT_7e_Gliederung_20_5" style:display-name="Титульная страница~LT~Gliederung 5" style:family="paragraph" style:parent-style-name="Титульная_20_страница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ая_20_страница_7e_LT_7e_Gliederung_20_6" style:display-name="Титульная страница~LT~Gliederung 6" style:family="paragraph" style:parent-style-name="Титульная_20_страница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ая_20_страница_7e_LT_7e_Gliederung_20_7" style:display-name="Титульная страница~LT~Gliederung 7" style:family="paragraph" style:parent-style-name="Титульная_20_страница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ая_20_страница_7e_LT_7e_Gliederung_20_8" style:display-name="Титульная страница~LT~Gliederung 8" style:family="paragraph" style:parent-style-name="Титульная_20_страница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ая_20_страница_7e_LT_7e_Gliederung_20_9" style:display-name="Титульная страница~LT~Gliederung 9" style:family="paragraph" style:parent-style-name="Титульная_20_страница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ая_20_страница_7e_LT_7e_Titel" style:display-name="Титульная страница~LT~Titel" style:family="paragraph">
      <style:paragraph-properties style:line-height-at-least="0cm" fo:text-align="start" style:justify-single-word="false" style:writing-mode="lr-tb"/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Титульная_20_страница_7e_LT_7e_Untertitel" style:display-name="Титульная страница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Титульная_20_страница_7e_LT_7e_Notizen" style:display-name="Титульная страница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Титульная_20_страница_7e_LT_7e_Hintergrundobjekte" style:display-name="Титульная страница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" style:font-family-complex="roboto" style:font-family-generic-complex="system" style:font-pitch-complex="variable" style:font-size-complex="12pt"/>
    </style:style>
    <style:style style:name="Титульная_20_страница_7e_LT_7e_Hintergrund" style:display-name="Титульная страница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" style:font-family-complex="roboto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roboto" style:font-family-complex="roboto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" style:font-family-complex="roboto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" style:font-family-complex="roboto" style:font-family-generic-complex="system" style:font-pitch-complex="variable" style:font-size-complex="12pt"/>
    </style:style>
    <style:style style:name="Примечания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 fo:line-height="110%" fo:text-align="start" style:justify-single-word="false" style:writing-mode="lr-tb"/>
      <style:text-properties fo:font-variant="normal" fo:text-transform="none" fo:color="#003f88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 fo:line-height="110%" fo:text-align="start" style:justify-single-word="false" style:writing-mode="lr-tb"/>
      <style:text-properties fo:font-variant="normal" fo:text-transform="none" fo:color="#002c5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екст_20_-_20_один_20_блок_7e_LT_7e_Gliederung_20_1" style:display-name="Текст - один блок~LT~Gliederung 1" style:family="paragraph">
      <style:paragraph-properties fo:margin-top="0.499cm" fo:margin-bottom="0cm" style:contextual-spacing="false" fo:line-height="110%" fo:text-align="start" style:justify-single-word="false" style:writing-mode="lr-tb"/>
      <style:text-properties fo:font-variant="normal" fo:text-transform="none" fo:color="#003f88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Текст_20_-_20_один_20_блок_7e_LT_7e_Gliederung_20_2" style:display-name="Текст - один блок~LT~Gliederung 2" style:family="paragraph" style:parent-style-name="Текст_20_-_20_один_20_блок_7e_LT_7e_Gliederung_20_1">
      <style:paragraph-properties fo:margin-top="0.4cm" fo:margin-bottom="0cm" style:contextual-spacing="false" fo:line-height="110%" fo:text-align="start" style:justify-single-word="false" style:writing-mode="lr-tb"/>
      <style:text-properties fo:font-variant="normal" fo:text-transform="none" fo:color="#002c5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Текст_20_-_20_один_20_блок_7e_LT_7e_Gliederung_20_3" style:display-name="Текст - один блок~LT~Gliederung 3" style:family="paragraph" style:parent-style-name="Текст_20_-_20_один_20_блок_7e_LT_7e_Gliederung_20_2">
      <style:paragraph-properties fo:margin-top="0.3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екст_20_-_20_один_20_блок_7e_LT_7e_Gliederung_20_4" style:display-name="Текст - один блок~LT~Gliederung 4" style:family="paragraph" style:parent-style-name="Текст_20_-_20_один_20_блок_7e_LT_7e_Gliederung_20_3">
      <style:paragraph-properties fo:margin-top="0.199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Текст_20_-_20_один_20_блок_7e_LT_7e_Gliederung_20_5" style:display-name="Текст - один блок~LT~Gliederung 5" style:family="paragraph" style:parent-style-name="Текст_20_-_20_один_20_блок_7e_LT_7e_Gliederung_20_4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екст_20_-_20_один_20_блок_7e_LT_7e_Gliederung_20_6" style:display-name="Текст - один блок~LT~Gliederung 6" style:family="paragraph" style:parent-style-name="Текст_20_-_20_один_20_блок_7e_LT_7e_Gliederung_20_5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екст_20_-_20_один_20_блок_7e_LT_7e_Gliederung_20_7" style:display-name="Текст - один блок~LT~Gliederung 7" style:family="paragraph" style:parent-style-name="Текст_20_-_20_один_20_блок_7e_LT_7e_Gliederung_20_6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екст_20_-_20_один_20_блок_7e_LT_7e_Gliederung_20_8" style:display-name="Текст - один блок~LT~Gliederung 8" style:family="paragraph" style:parent-style-name="Текст_20_-_20_один_20_блок_7e_LT_7e_Gliederung_20_7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екст_20_-_20_один_20_блок_7e_LT_7e_Gliederung_20_9" style:display-name="Текст - один блок~LT~Gliederung 9" style:family="paragraph" style:parent-style-name="Текст_20_-_20_один_20_блок_7e_LT_7e_Gliederung_20_8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екст_20_-_20_один_20_блок_7e_LT_7e_Titel" style:display-name="Текст - один блок~LT~Titel" style:family="paragraph">
      <style:paragraph-properties style:line-height-at-least="0.176cm" fo:text-align="start" style:justify-single-word="false" style:writing-mode="lr-tb"/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Текст_20_-_20_один_20_блок_7e_LT_7e_Untertitel" style:display-name="Текст - один блок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Текст_20_-_20_один_20_блок_7e_LT_7e_Notizen" style:display-name="Текст - один блок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Текст_20_-_20_один_20_блок_7e_LT_7e_Hintergrundobjekte" style:display-name="Текст - один блок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" style:font-family-complex="roboto" style:font-family-generic-complex="system" style:font-pitch-complex="variable" style:font-size-complex="12pt"/>
    </style:style>
    <style:style style:name="Текст_20_-_20_один_20_блок_7e_LT_7e_Hintergrund" style:display-name="Текст - один блок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" style:font-family-complex="roboto" style:font-family-generic-complex="system" style:font-pitch-complex="variable" style:font-size-complex="12pt"/>
    </style:style>
    <style:style style:name="Текст_20_-_20_два_20_блока_7e_LT_7e_Gliederung_20_1" style:display-name="Текст - два блока~LT~Gliederung 1" style:family="paragraph">
      <style:paragraph-properties fo:margin-top="0.499cm" fo:margin-bottom="0cm" style:contextual-spacing="false" fo:line-height="110%" fo:text-align="start" style:justify-single-word="false" style:writing-mode="lr-tb"/>
      <style:text-properties fo:font-variant="normal" fo:text-transform="none" fo:color="#003f88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Текст_20_-_20_два_20_блока_7e_LT_7e_Gliederung_20_2" style:display-name="Текст - два блока~LT~Gliederung 2" style:family="paragraph" style:parent-style-name="Текст_20_-_20_два_20_блока_7e_LT_7e_Gliederung_20_1">
      <style:paragraph-properties fo:margin-top="0.4cm" fo:margin-bottom="0cm" style:contextual-spacing="false" fo:line-height="110%" fo:text-align="start" style:justify-single-word="false" style:writing-mode="lr-tb"/>
      <style:text-properties fo:font-variant="normal" fo:text-transform="none" fo:color="#002c5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Текст_20_-_20_два_20_блока_7e_LT_7e_Gliederung_20_3" style:display-name="Текст - два блока~LT~Gliederung 3" style:family="paragraph" style:parent-style-name="Текст_20_-_20_два_20_блока_7e_LT_7e_Gliederung_20_2">
      <style:paragraph-properties fo:margin-top="0.3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екст_20_-_20_два_20_блока_7e_LT_7e_Gliederung_20_4" style:display-name="Текст - два блока~LT~Gliederung 4" style:family="paragraph" style:parent-style-name="Текст_20_-_20_два_20_блока_7e_LT_7e_Gliederung_20_3">
      <style:paragraph-properties fo:margin-top="0.199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Текст_20_-_20_два_20_блока_7e_LT_7e_Gliederung_20_5" style:display-name="Текст - два блока~LT~Gliederung 5" style:family="paragraph" style:parent-style-name="Текст_20_-_20_два_20_блока_7e_LT_7e_Gliederung_20_4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екст_20_-_20_два_20_блока_7e_LT_7e_Gliederung_20_6" style:display-name="Текст - два блока~LT~Gliederung 6" style:family="paragraph" style:parent-style-name="Текст_20_-_20_два_20_блока_7e_LT_7e_Gliederung_20_5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екст_20_-_20_два_20_блока_7e_LT_7e_Gliederung_20_7" style:display-name="Текст - два блока~LT~Gliederung 7" style:family="paragraph" style:parent-style-name="Текст_20_-_20_два_20_блока_7e_LT_7e_Gliederung_20_6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екст_20_-_20_два_20_блока_7e_LT_7e_Gliederung_20_8" style:display-name="Текст - два блока~LT~Gliederung 8" style:family="paragraph" style:parent-style-name="Текст_20_-_20_два_20_блока_7e_LT_7e_Gliederung_20_7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екст_20_-_20_два_20_блока_7e_LT_7e_Gliederung_20_9" style:display-name="Текст - два блока~LT~Gliederung 9" style:family="paragraph" style:parent-style-name="Текст_20_-_20_два_20_блока_7e_LT_7e_Gliederung_20_8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екст_20_-_20_два_20_блока_7e_LT_7e_Titel" style:display-name="Текст - два блока~LT~Titel" style:family="paragraph">
      <style:paragraph-properties style:line-height-at-least="0.176cm" fo:text-align="start" style:justify-single-word="false" style:writing-mode="lr-tb"/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Текст_20_-_20_два_20_блока_7e_LT_7e_Untertitel" style:display-name="Текст - два блока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Текст_20_-_20_два_20_блока_7e_LT_7e_Notizen" style:display-name="Текст - два блока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Текст_20_-_20_два_20_блока_7e_LT_7e_Hintergrundobjekte" style:display-name="Текст - два блока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" style:font-family-complex="roboto" style:font-family-generic-complex="system" style:font-pitch-complex="variable" style:font-size-complex="12pt"/>
    </style:style>
    <style:style style:name="Текст_20_-_20_два_20_блока_7e_LT_7e_Hintergrund" style:display-name="Текст - два блока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" style:font-family-complex="roboto" style:font-family-generic-complex="system" style:font-pitch-complex="variable" style:font-size-complex="12pt"/>
    </style:style>
    <style:style style:name="Текст_20_-_20_две_20_колонки_20_в_20_одном_20_блоке_7e_LT_7e_Gliederung_20_1" style:display-name="Текст - две колонки в одном блоке~LT~Gliederung 1" style:family="paragraph">
      <style:paragraph-properties fo:margin-top="0.499cm" fo:margin-bottom="0cm" style:contextual-spacing="false" fo:line-height="110%" fo:text-align="start" style:justify-single-word="false" style:writing-mode="lr-tb"/>
      <style:text-properties fo:font-variant="normal" fo:text-transform="none" fo:color="#003f88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Текст_20_-_20_две_20_колонки_20_в_20_одном_20_блоке_7e_LT_7e_Gliederung_20_2" style:display-name="Текст - две колонки в одном блоке~LT~Gliederung 2" style:family="paragraph" style:parent-style-name="Текст_20_-_20_две_20_колонки_20_в_20_одном_20_блоке_7e_LT_7e_Gliederung_20_1">
      <style:paragraph-properties fo:margin-top="0.4cm" fo:margin-bottom="0cm" style:contextual-spacing="false" fo:line-height="110%" fo:text-align="start" style:justify-single-word="false" style:writing-mode="lr-tb"/>
      <style:text-properties fo:font-variant="normal" fo:text-transform="none" fo:color="#002c5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Текст_20_-_20_две_20_колонки_20_в_20_одном_20_блоке_7e_LT_7e_Gliederung_20_3" style:display-name="Текст - две колонки в одном блоке~LT~Gliederung 3" style:family="paragraph" style:parent-style-name="Текст_20_-_20_две_20_колонки_20_в_20_одном_20_блоке_7e_LT_7e_Gliederung_20_2">
      <style:paragraph-properties fo:margin-top="0.3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екст_20_-_20_две_20_колонки_20_в_20_одном_20_блоке_7e_LT_7e_Gliederung_20_4" style:display-name="Текст - две колонки в одном блоке~LT~Gliederung 4" style:family="paragraph" style:parent-style-name="Текст_20_-_20_две_20_колонки_20_в_20_одном_20_блоке_7e_LT_7e_Gliederung_20_3">
      <style:paragraph-properties fo:margin-top="0.199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Текст_20_-_20_две_20_колонки_20_в_20_одном_20_блоке_7e_LT_7e_Gliederung_20_5" style:display-name="Текст - две колонки в одном блоке~LT~Gliederung 5" style:family="paragraph" style:parent-style-name="Текст_20_-_20_две_20_колонки_20_в_20_одном_20_блоке_7e_LT_7e_Gliederung_20_4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екст_20_-_20_две_20_колонки_20_в_20_одном_20_блоке_7e_LT_7e_Gliederung_20_6" style:display-name="Текст - две колонки в одном блоке~LT~Gliederung 6" style:family="paragraph" style:parent-style-name="Текст_20_-_20_две_20_колонки_20_в_20_одном_20_блоке_7e_LT_7e_Gliederung_20_5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екст_20_-_20_две_20_колонки_20_в_20_одном_20_блоке_7e_LT_7e_Gliederung_20_7" style:display-name="Текст - две колонки в одном блоке~LT~Gliederung 7" style:family="paragraph" style:parent-style-name="Текст_20_-_20_две_20_колонки_20_в_20_одном_20_блоке_7e_LT_7e_Gliederung_20_6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екст_20_-_20_две_20_колонки_20_в_20_одном_20_блоке_7e_LT_7e_Gliederung_20_8" style:display-name="Текст - две колонки в одном блоке~LT~Gliederung 8" style:family="paragraph" style:parent-style-name="Текст_20_-_20_две_20_колонки_20_в_20_одном_20_блоке_7e_LT_7e_Gliederung_20_7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екст_20_-_20_две_20_колонки_20_в_20_одном_20_блоке_7e_LT_7e_Gliederung_20_9" style:display-name="Текст - две колонки в одном блоке~LT~Gliederung 9" style:family="paragraph" style:parent-style-name="Текст_20_-_20_две_20_колонки_20_в_20_одном_20_блоке_7e_LT_7e_Gliederung_20_8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екст_20_-_20_две_20_колонки_20_в_20_одном_20_блоке_7e_LT_7e_Titel" style:display-name="Текст - две колонки в одном блоке~LT~Titel" style:family="paragraph">
      <style:paragraph-properties style:line-height-at-least="0.176cm" fo:text-align="start" style:justify-single-word="false" style:writing-mode="lr-tb"/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Текст_20_-_20_две_20_колонки_20_в_20_одном_20_блоке_7e_LT_7e_Untertitel" style:display-name="Текст - две колонки в одном блоке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Текст_20_-_20_две_20_колонки_20_в_20_одном_20_блоке_7e_LT_7e_Notizen" style:display-name="Текст - две колонки в одном блоке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Текст_20_-_20_две_20_колонки_20_в_20_одном_20_блоке_7e_LT_7e_Hintergrundobjekte" style:display-name="Текст - две колонки в одном блоке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" style:font-family-complex="roboto" style:font-family-generic-complex="system" style:font-pitch-complex="variable" style:font-size-complex="12pt"/>
    </style:style>
    <style:style style:name="Текст_20_-_20_две_20_колонки_20_в_20_одном_20_блоке_7e_LT_7e_Hintergrund" style:display-name="Текст - две колонки в одном блоке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" style:font-family-complex="roboto" style:font-family-generic-complex="system" style:font-pitch-complex="variable" style:font-size-complex="12pt"/>
    </style:style>
    <style:style style:name="Пустой_20_слайд_20_с_20_заголовком_7e_LT_7e_Gliederung_20_1" style:display-name="Пустой слайд с заголовком~LT~Gliederung 1" style:family="paragraph">
      <style:paragraph-properties fo:margin-top="0.499cm" fo:margin-bottom="0cm" style:contextual-spacing="false" fo:line-height="110%" fo:text-align="start" style:justify-single-word="false" style:writing-mode="lr-tb"/>
      <style:text-properties fo:font-variant="normal" fo:text-transform="none" fo:color="#003f88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Пустой_20_слайд_20_с_20_заголовком_7e_LT_7e_Gliederung_20_2" style:display-name="Пустой слайд с заголовком~LT~Gliederung 2" style:family="paragraph" style:parent-style-name="Пустой_20_слайд_20_с_20_заголовком_7e_LT_7e_Gliederung_20_1">
      <style:paragraph-properties fo:margin-top="0.4cm" fo:margin-bottom="0cm" style:contextual-spacing="false" fo:line-height="110%" fo:text-align="start" style:justify-single-word="false" style:writing-mode="lr-tb"/>
      <style:text-properties fo:font-variant="normal" fo:text-transform="none" fo:color="#002c5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Пустой_20_слайд_20_с_20_заголовком_7e_LT_7e_Gliederung_20_3" style:display-name="Пустой слайд с заголовком~LT~Gliederung 3" style:family="paragraph" style:parent-style-name="Пустой_20_слайд_20_с_20_заголовком_7e_LT_7e_Gliederung_20_2">
      <style:paragraph-properties fo:margin-top="0.3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Пустой_20_слайд_20_с_20_заголовком_7e_LT_7e_Gliederung_20_4" style:display-name="Пустой слайд с заголовком~LT~Gliederung 4" style:family="paragraph" style:parent-style-name="Пустой_20_слайд_20_с_20_заголовком_7e_LT_7e_Gliederung_20_3">
      <style:paragraph-properties fo:margin-top="0.199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Пустой_20_слайд_20_с_20_заголовком_7e_LT_7e_Gliederung_20_5" style:display-name="Пустой слайд с заголовком~LT~Gliederung 5" style:family="paragraph" style:parent-style-name="Пустой_20_слайд_20_с_20_заголовком_7e_LT_7e_Gliederung_20_4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20_с_20_заголовком_7e_LT_7e_Gliederung_20_6" style:display-name="Пустой слайд с заголовком~LT~Gliederung 6" style:family="paragraph" style:parent-style-name="Пустой_20_слайд_20_с_20_заголовком_7e_LT_7e_Gliederung_20_5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20_с_20_заголовком_7e_LT_7e_Gliederung_20_7" style:display-name="Пустой слайд с заголовком~LT~Gliederung 7" style:family="paragraph" style:parent-style-name="Пустой_20_слайд_20_с_20_заголовком_7e_LT_7e_Gliederung_20_6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20_с_20_заголовком_7e_LT_7e_Gliederung_20_8" style:display-name="Пустой слайд с заголовком~LT~Gliederung 8" style:family="paragraph" style:parent-style-name="Пустой_20_слайд_20_с_20_заголовком_7e_LT_7e_Gliederung_20_7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20_с_20_заголовком_7e_LT_7e_Gliederung_20_9" style:display-name="Пустой слайд с заголовком~LT~Gliederung 9" style:family="paragraph" style:parent-style-name="Пустой_20_слайд_20_с_20_заголовком_7e_LT_7e_Gliederung_20_8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20_с_20_заголовком_7e_LT_7e_Titel" style:display-name="Пустой слайд с заголовком~LT~Titel" style:family="paragraph">
      <style:paragraph-properties style:line-height-at-least="0.176cm" fo:text-align="start" style:justify-single-word="false" style:writing-mode="lr-tb"/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Пустой_20_слайд_20_с_20_заголовком_7e_LT_7e_Untertitel" style:display-name="Пустой слайд с заголовком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Пустой_20_слайд_20_с_20_заголовком_7e_LT_7e_Notizen" style:display-name="Пустой слайд с заголовком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Пустой_20_слайд_20_с_20_заголовком_7e_LT_7e_Hintergrundobjekte" style:display-name="Пустой слайд с заголовком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" style:font-family-complex="roboto" style:font-family-generic-complex="system" style:font-pitch-complex="variable" style:font-size-complex="12pt"/>
    </style:style>
    <style:style style:name="Пустой_20_слайд_20_с_20_заголовком_7e_LT_7e_Hintergrund" style:display-name="Пустой слайд с заголовком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" style:font-family-complex="roboto" style:font-family-generic-complex="system" style:font-pitch-complex="variable" style:font-size-complex="12pt"/>
    </style:style>
    <style:style style:name="Завершение_20_презентации_20_1_7e_LT_7e_Gliederung_20_1" style:display-name="Завершение презентации 1~LT~Gliederung 1" style:family="paragraph">
      <style:paragraph-properties fo:margin-top="0.499cm" fo:margin-bottom="0cm" style:contextual-spacing="false" fo:line-height="110%" fo:text-align="start" style:justify-single-word="false" style:writing-mode="lr-tb"/>
      <style:text-properties fo:font-variant="normal" fo:text-transform="none" fo:color="#003f88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Завершение_20_презентации_20_1_7e_LT_7e_Gliederung_20_2" style:display-name="Завершение презентации 1~LT~Gliederung 2" style:family="paragraph" style:parent-style-name="Завершение_20_презентации_20_1_7e_LT_7e_Gliederung_20_1">
      <style:paragraph-properties fo:margin-top="0.4cm" fo:margin-bottom="0cm" style:contextual-spacing="false" fo:line-height="110%" fo:text-align="start" style:justify-single-word="false" style:writing-mode="lr-tb"/>
      <style:text-properties fo:font-variant="normal" fo:text-transform="none" fo:color="#002c5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Завершение_20_презентации_20_1_7e_LT_7e_Gliederung_20_3" style:display-name="Завершение презентации 1~LT~Gliederung 3" style:family="paragraph" style:parent-style-name="Завершение_20_презентации_20_1_7e_LT_7e_Gliederung_20_2">
      <style:paragraph-properties fo:margin-top="0.3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вершение_20_презентации_20_1_7e_LT_7e_Gliederung_20_4" style:display-name="Завершение презентации 1~LT~Gliederung 4" style:family="paragraph" style:parent-style-name="Завершение_20_презентации_20_1_7e_LT_7e_Gliederung_20_3">
      <style:paragraph-properties fo:margin-top="0.199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Завершение_20_презентации_20_1_7e_LT_7e_Gliederung_20_5" style:display-name="Завершение презентации 1~LT~Gliederung 5" style:family="paragraph" style:parent-style-name="Завершение_20_презентации_20_1_7e_LT_7e_Gliederung_20_4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1_7e_LT_7e_Gliederung_20_6" style:display-name="Завершение презентации 1~LT~Gliederung 6" style:family="paragraph" style:parent-style-name="Завершение_20_презентации_20_1_7e_LT_7e_Gliederung_20_5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1_7e_LT_7e_Gliederung_20_7" style:display-name="Завершение презентации 1~LT~Gliederung 7" style:family="paragraph" style:parent-style-name="Завершение_20_презентации_20_1_7e_LT_7e_Gliederung_20_6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1_7e_LT_7e_Gliederung_20_8" style:display-name="Завершение презентации 1~LT~Gliederung 8" style:family="paragraph" style:parent-style-name="Завершение_20_презентации_20_1_7e_LT_7e_Gliederung_20_7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1_7e_LT_7e_Gliederung_20_9" style:display-name="Завершение презентации 1~LT~Gliederung 9" style:family="paragraph" style:parent-style-name="Завершение_20_презентации_20_1_7e_LT_7e_Gliederung_20_8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1_7e_LT_7e_Titel" style:display-name="Завершение презентации 1~LT~Titel" style:family="paragraph">
      <style:paragraph-properties style:line-height-at-least="0.176cm" fo:text-align="start" style:justify-single-word="false" style:writing-mode="lr-tb"/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Завершение_20_презентации_20_1_7e_LT_7e_Untertitel" style:display-name="Завершение презентации 1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Завершение_20_презентации_20_1_7e_LT_7e_Notizen" style:display-name="Завершение презентации 1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Завершение_20_презентации_20_1_7e_LT_7e_Hintergrundobjekte" style:display-name="Завершение презентации 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" style:font-family-complex="roboto" style:font-family-generic-complex="system" style:font-pitch-complex="variable" style:font-size-complex="12pt"/>
    </style:style>
    <style:style style:name="Завершение_20_презентации_20_1_7e_LT_7e_Hintergrund" style:display-name="Завершение презентации 1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" style:font-family-complex="roboto" style:font-family-generic-complex="system" style:font-pitch-complex="variable" style:font-size-complex="12pt"/>
    </style:style>
    <style:style style:name="Завершение_20_презентации_20_2_7e_LT_7e_Gliederung_20_1" style:display-name="Завершение презентации 2~LT~Gliederung 1" style:family="paragraph">
      <style:paragraph-properties fo:margin-top="0.499cm" fo:margin-bottom="0cm" style:contextual-spacing="false" fo:line-height="110%" fo:text-align="start" style:justify-single-word="false" style:writing-mode="lr-tb"/>
      <style:text-properties fo:font-variant="normal" fo:text-transform="none" fo:color="#003f88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Завершение_20_презентации_20_2_7e_LT_7e_Gliederung_20_2" style:display-name="Завершение презентации 2~LT~Gliederung 2" style:family="paragraph" style:parent-style-name="Завершение_20_презентации_20_2_7e_LT_7e_Gliederung_20_1">
      <style:paragraph-properties fo:margin-top="0.4cm" fo:margin-bottom="0cm" style:contextual-spacing="false" fo:line-height="110%" fo:text-align="start" style:justify-single-word="false" style:writing-mode="lr-tb"/>
      <style:text-properties fo:font-variant="normal" fo:text-transform="none" fo:color="#002c5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Завершение_20_презентации_20_2_7e_LT_7e_Gliederung_20_3" style:display-name="Завершение презентации 2~LT~Gliederung 3" style:family="paragraph" style:parent-style-name="Завершение_20_презентации_20_2_7e_LT_7e_Gliederung_20_2">
      <style:paragraph-properties fo:margin-top="0.3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вершение_20_презентации_20_2_7e_LT_7e_Gliederung_20_4" style:display-name="Завершение презентации 2~LT~Gliederung 4" style:family="paragraph" style:parent-style-name="Завершение_20_презентации_20_2_7e_LT_7e_Gliederung_20_3">
      <style:paragraph-properties fo:margin-top="0.199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Завершение_20_презентации_20_2_7e_LT_7e_Gliederung_20_5" style:display-name="Завершение презентации 2~LT~Gliederung 5" style:family="paragraph" style:parent-style-name="Завершение_20_презентации_20_2_7e_LT_7e_Gliederung_20_4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2_7e_LT_7e_Gliederung_20_6" style:display-name="Завершение презентации 2~LT~Gliederung 6" style:family="paragraph" style:parent-style-name="Завершение_20_презентации_20_2_7e_LT_7e_Gliederung_20_5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2_7e_LT_7e_Gliederung_20_7" style:display-name="Завершение презентации 2~LT~Gliederung 7" style:family="paragraph" style:parent-style-name="Завершение_20_презентации_20_2_7e_LT_7e_Gliederung_20_6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2_7e_LT_7e_Gliederung_20_8" style:display-name="Завершение презентации 2~LT~Gliederung 8" style:family="paragraph" style:parent-style-name="Завершение_20_презентации_20_2_7e_LT_7e_Gliederung_20_7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2_7e_LT_7e_Gliederung_20_9" style:display-name="Завершение презентации 2~LT~Gliederung 9" style:family="paragraph" style:parent-style-name="Завершение_20_презентации_20_2_7e_LT_7e_Gliederung_20_8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2_7e_LT_7e_Titel" style:display-name="Завершение презентации 2~LT~Titel" style:family="paragraph">
      <style:paragraph-properties style:line-height-at-least="0.176cm" fo:text-align="start" style:justify-single-word="false" style:writing-mode="lr-tb"/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Завершение_20_презентации_20_2_7e_LT_7e_Untertitel" style:display-name="Завершение презентации 2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Завершение_20_презентации_20_2_7e_LT_7e_Notizen" style:display-name="Завершение презентации 2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Завершение_20_презентации_20_2_7e_LT_7e_Hintergrundobjekte" style:display-name="Завершение презентации 2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" style:font-family-complex="roboto" style:font-family-generic-complex="system" style:font-pitch-complex="variable" style:font-size-complex="12pt"/>
    </style:style>
    <style:style style:name="Завершение_20_презентации_20_2_7e_LT_7e_Hintergrund" style:display-name="Завершение презентации 2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" style:font-family-complex="roboto" style:font-family-generic-complex="system" style:font-pitch-complex="variable" style:font-size-complex="12pt"/>
    </style:style>
    <style:style style:name="Завершение_20_презентации_20_3_20_-_20_для_20_выступлений_7e_LT_7e_Gliederung_20_1" style:display-name="Завершение презентации 3 - для выступлений~LT~Gliederung 1" style:family="paragraph">
      <style:paragraph-properties fo:margin-top="0.499cm" fo:margin-bottom="0cm" style:contextual-spacing="false" fo:line-height="110%" fo:text-align="start" style:justify-single-word="false" style:writing-mode="lr-tb"/>
      <style:text-properties fo:font-variant="normal" fo:text-transform="none" fo:color="#003f88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Завершение_20_презентации_20_3_20_-_20_для_20_выступлений_7e_LT_7e_Gliederung_20_2" style:display-name="Завершение презентации 3 - для выступлений~LT~Gliederung 2" style:family="paragraph" style:parent-style-name="Завершение_20_презентации_20_3_20_-_20_для_20_выступлений_7e_LT_7e_Gliederung_20_1">
      <style:paragraph-properties fo:margin-top="0.4cm" fo:margin-bottom="0cm" style:contextual-spacing="false" fo:line-height="110%" fo:text-align="start" style:justify-single-word="false" style:writing-mode="lr-tb"/>
      <style:text-properties fo:font-variant="normal" fo:text-transform="none" fo:color="#002c5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Завершение_20_презентации_20_3_20_-_20_для_20_выступлений_7e_LT_7e_Gliederung_20_3" style:display-name="Завершение презентации 3 - для выступлений~LT~Gliederung 3" style:family="paragraph" style:parent-style-name="Завершение_20_презентации_20_3_20_-_20_для_20_выступлений_7e_LT_7e_Gliederung_20_2">
      <style:paragraph-properties fo:margin-top="0.3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вершение_20_презентации_20_3_20_-_20_для_20_выступлений_7e_LT_7e_Gliederung_20_4" style:display-name="Завершение презентации 3 - для выступлений~LT~Gliederung 4" style:family="paragraph" style:parent-style-name="Завершение_20_презентации_20_3_20_-_20_для_20_выступлений_7e_LT_7e_Gliederung_20_3">
      <style:paragraph-properties fo:margin-top="0.199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Завершение_20_презентации_20_3_20_-_20_для_20_выступлений_7e_LT_7e_Gliederung_20_5" style:display-name="Завершение презентации 3 - для выступлений~LT~Gliederung 5" style:family="paragraph" style:parent-style-name="Завершение_20_презентации_20_3_20_-_20_для_20_выступлений_7e_LT_7e_Gliederung_20_4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3_20_-_20_для_20_выступлений_7e_LT_7e_Gliederung_20_6" style:display-name="Завершение презентации 3 - для выступлений~LT~Gliederung 6" style:family="paragraph" style:parent-style-name="Завершение_20_презентации_20_3_20_-_20_для_20_выступлений_7e_LT_7e_Gliederung_20_5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3_20_-_20_для_20_выступлений_7e_LT_7e_Gliederung_20_7" style:display-name="Завершение презентации 3 - для выступлений~LT~Gliederung 7" style:family="paragraph" style:parent-style-name="Завершение_20_презентации_20_3_20_-_20_для_20_выступлений_7e_LT_7e_Gliederung_20_6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3_20_-_20_для_20_выступлений_7e_LT_7e_Gliederung_20_8" style:display-name="Завершение презентации 3 - для выступлений~LT~Gliederung 8" style:family="paragraph" style:parent-style-name="Завершение_20_презентации_20_3_20_-_20_для_20_выступлений_7e_LT_7e_Gliederung_20_7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3_20_-_20_для_20_выступлений_7e_LT_7e_Gliederung_20_9" style:display-name="Завершение презентации 3 - для выступлений~LT~Gliederung 9" style:family="paragraph" style:parent-style-name="Завершение_20_презентации_20_3_20_-_20_для_20_выступлений_7e_LT_7e_Gliederung_20_8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3_20_-_20_для_20_выступлений_7e_LT_7e_Titel" style:display-name="Завершение презентации 3 - для выступлений~LT~Titel" style:family="paragraph">
      <style:paragraph-properties style:line-height-at-least="0.176cm" fo:text-align="start" style:justify-single-word="false" style:writing-mode="lr-tb"/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Завершение_20_презентации_20_3_20_-_20_для_20_выступлений_7e_LT_7e_Untertitel" style:display-name="Завершение презентации 3 - для выступлений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Завершение_20_презентации_20_3_20_-_20_для_20_выступлений_7e_LT_7e_Notizen" style:display-name="Завершение презентации 3 - для выступлений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Завершение_20_презентации_20_3_20_-_20_для_20_выступлений_7e_LT_7e_Hintergrundobjekte" style:display-name="Завершение презентации 3 - для выступлений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" style:font-family-complex="roboto" style:font-family-generic-complex="system" style:font-pitch-complex="variable" style:font-size-complex="12pt"/>
    </style:style>
    <style:style style:name="Завершение_20_презентации_20_3_20_-_20_для_20_выступлений_7e_LT_7e_Hintergrund" style:display-name="Завершение презентации 3 - для выступлений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" style:font-family-complex="roboto" style:font-family-generic-complex="system" style:font-pitch-complex="variable" style:font-size-complex="12pt"/>
    </style:style>
    <style:style style:name="Завершение_20_презентации_20_4_20_-_20_с_20_контактами_7e_LT_7e_Gliederung_20_1" style:display-name="Завершение презентации 4 - с контактами~LT~Gliederung 1" style:family="paragraph">
      <style:paragraph-properties fo:margin-top="0.499cm" fo:margin-bottom="0cm" style:contextual-spacing="false" fo:line-height="110%" fo:text-align="start" style:justify-single-word="false" style:writing-mode="lr-tb"/>
      <style:text-properties fo:font-variant="normal" fo:text-transform="none" fo:color="#003f88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Завершение_20_презентации_20_4_20_-_20_с_20_контактами_7e_LT_7e_Gliederung_20_2" style:display-name="Завершение презентации 4 - с контактами~LT~Gliederung 2" style:family="paragraph" style:parent-style-name="Завершение_20_презентации_20_4_20_-_20_с_20_контактами_7e_LT_7e_Gliederung_20_1">
      <style:paragraph-properties fo:margin-top="0.4cm" fo:margin-bottom="0cm" style:contextual-spacing="false" fo:line-height="110%" fo:text-align="start" style:justify-single-word="false" style:writing-mode="lr-tb"/>
      <style:text-properties fo:font-variant="normal" fo:text-transform="none" fo:color="#002c5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Завершение_20_презентации_20_4_20_-_20_с_20_контактами_7e_LT_7e_Gliederung_20_3" style:display-name="Завершение презентации 4 - с контактами~LT~Gliederung 3" style:family="paragraph" style:parent-style-name="Завершение_20_презентации_20_4_20_-_20_с_20_контактами_7e_LT_7e_Gliederung_20_2">
      <style:paragraph-properties fo:margin-top="0.3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вершение_20_презентации_20_4_20_-_20_с_20_контактами_7e_LT_7e_Gliederung_20_4" style:display-name="Завершение презентации 4 - с контактами~LT~Gliederung 4" style:family="paragraph" style:parent-style-name="Завершение_20_презентации_20_4_20_-_20_с_20_контактами_7e_LT_7e_Gliederung_20_3">
      <style:paragraph-properties fo:margin-top="0.199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Завершение_20_презентации_20_4_20_-_20_с_20_контактами_7e_LT_7e_Gliederung_20_5" style:display-name="Завершение презентации 4 - с контактами~LT~Gliederung 5" style:family="paragraph" style:parent-style-name="Завершение_20_презентации_20_4_20_-_20_с_20_контактами_7e_LT_7e_Gliederung_20_4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4_20_-_20_с_20_контактами_7e_LT_7e_Gliederung_20_6" style:display-name="Завершение презентации 4 - с контактами~LT~Gliederung 6" style:family="paragraph" style:parent-style-name="Завершение_20_презентации_20_4_20_-_20_с_20_контактами_7e_LT_7e_Gliederung_20_5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4_20_-_20_с_20_контактами_7e_LT_7e_Gliederung_20_7" style:display-name="Завершение презентации 4 - с контактами~LT~Gliederung 7" style:family="paragraph" style:parent-style-name="Завершение_20_презентации_20_4_20_-_20_с_20_контактами_7e_LT_7e_Gliederung_20_6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4_20_-_20_с_20_контактами_7e_LT_7e_Gliederung_20_8" style:display-name="Завершение презентации 4 - с контактами~LT~Gliederung 8" style:family="paragraph" style:parent-style-name="Завершение_20_презентации_20_4_20_-_20_с_20_контактами_7e_LT_7e_Gliederung_20_7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4_20_-_20_с_20_контактами_7e_LT_7e_Gliederung_20_9" style:display-name="Завершение презентации 4 - с контактами~LT~Gliederung 9" style:family="paragraph" style:parent-style-name="Завершение_20_презентации_20_4_20_-_20_с_20_контактами_7e_LT_7e_Gliederung_20_8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4_20_-_20_с_20_контактами_7e_LT_7e_Titel" style:display-name="Завершение презентации 4 - с контактами~LT~Titel" style:family="paragraph">
      <style:paragraph-properties style:line-height-at-least="0.176cm" fo:text-align="start" style:justify-single-word="false" style:writing-mode="lr-tb"/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Завершение_20_презентации_20_4_20_-_20_с_20_контактами_7e_LT_7e_Untertitel" style:display-name="Завершение презентации 4 - с контактами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Завершение_20_презентации_20_4_20_-_20_с_20_контактами_7e_LT_7e_Notizen" style:display-name="Завершение презентации 4 - с контактами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Завершение_20_презентации_20_4_20_-_20_с_20_контактами_7e_LT_7e_Hintergrundobjekte" style:display-name="Завершение презентации 4 - с контактами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" style:font-family-complex="roboto" style:font-family-generic-complex="system" style:font-pitch-complex="variable" style:font-size-complex="12pt"/>
    </style:style>
    <style:style style:name="Завершение_20_презентации_20_4_20_-_20_с_20_контактами_7e_LT_7e_Hintergrund" style:display-name="Завершение презентации 4 - с контактами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" style:font-family-complex="roboto" style:font-family-generic-complex="system" style:font-pitch-complex="variable" style:font-size-complex="12pt"/>
    </style:style>
    <style:style style:name="Пустой_20_слайд_7e_LT_7e_Gliederung_20_1" style:display-name="Пустой слайд~LT~Gliederung 1" style:family="paragraph">
      <style:paragraph-properties fo:margin-top="0.499cm" fo:margin-bottom="0cm" style:contextual-spacing="false" fo:line-height="110%" fo:text-align="start" style:justify-single-word="false" style:writing-mode="lr-tb"/>
      <style:text-properties fo:font-variant="normal" fo:text-transform="none" fo:color="#003f88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Пустой_20_слайд_7e_LT_7e_Gliederung_20_2" style:display-name="Пустой слайд~LT~Gliederung 2" style:family="paragraph" style:parent-style-name="Пустой_20_слайд_7e_LT_7e_Gliederung_20_1">
      <style:paragraph-properties fo:margin-top="0.4cm" fo:margin-bottom="0cm" style:contextual-spacing="false" fo:line-height="110%" fo:text-align="start" style:justify-single-word="false" style:writing-mode="lr-tb"/>
      <style:text-properties fo:font-variant="normal" fo:text-transform="none" fo:color="#002c5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Пустой_20_слайд_7e_LT_7e_Gliederung_20_3" style:display-name="Пустой слайд~LT~Gliederung 3" style:family="paragraph" style:parent-style-name="Пустой_20_слайд_7e_LT_7e_Gliederung_20_2">
      <style:paragraph-properties fo:margin-top="0.3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Пустой_20_слайд_7e_LT_7e_Gliederung_20_4" style:display-name="Пустой слайд~LT~Gliederung 4" style:family="paragraph" style:parent-style-name="Пустой_20_слайд_7e_LT_7e_Gliederung_20_3">
      <style:paragraph-properties fo:margin-top="0.199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Пустой_20_слайд_7e_LT_7e_Gliederung_20_5" style:display-name="Пустой слайд~LT~Gliederung 5" style:family="paragraph" style:parent-style-name="Пустой_20_слайд_7e_LT_7e_Gliederung_20_4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6" style:display-name="Пустой слайд~LT~Gliederung 6" style:family="paragraph" style:parent-style-name="Пустой_20_слайд_7e_LT_7e_Gliederung_20_5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7" style:display-name="Пустой слайд~LT~Gliederung 7" style:family="paragraph" style:parent-style-name="Пустой_20_слайд_7e_LT_7e_Gliederung_20_6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8" style:display-name="Пустой слайд~LT~Gliederung 8" style:family="paragraph" style:parent-style-name="Пустой_20_слайд_7e_LT_7e_Gliederung_20_7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9" style:display-name="Пустой слайд~LT~Gliederung 9" style:family="paragraph" style:parent-style-name="Пустой_20_слайд_7e_LT_7e_Gliederung_20_8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Titel" style:display-name="Пустой слайд~LT~Titel" style:family="paragraph">
      <style:paragraph-properties style:line-height-at-least="0.176cm" fo:text-align="start" style:justify-single-word="false" style:writing-mode="lr-tb"/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Пустой_20_слайд_7e_LT_7e_Untertitel" style:display-name="Пустой слайд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Пустой_20_слайд_7e_LT_7e_Notizen" style:display-name="Пустой слайд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Пустой_20_слайд_7e_LT_7e_Hintergrundobjekte" style:display-name="Пустой слайд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" style:font-family-complex="roboto" style:font-family-generic-complex="system" style:font-pitch-complex="variable" style:font-size-complex="12pt"/>
    </style:style>
    <style:style style:name="Пустой_20_слайд_7e_LT_7e_Hintergrund" style:display-name="Пустой слайд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" style:font-family-complex="roboto" style:font-family-generic-complex="system" style:font-pitch-complex="variable" style:font-size-complex="12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2" style:font-family-complex="'Noto Sans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5T11:41:22.292700646</meta:creation-date>
    <dc:date>2026-06-05T01:52:01.728090277</dc:date>
    <meta:editing-duration>PT34M2S</meta:editing-duration>
    <meta:editing-cycles>6</meta:editing-cycles>
    <meta:generator>LibreOffice/24.2.7.2$Linux_X86_64 LibreOffice_project/420$Build-2</meta:generator>
    <meta:document-statistic meta:table-count="0" meta:image-count="3" meta:object-count="0" meta:page-count="4" meta:paragraph-count="72" meta:word-count="490" meta:character-count="4282" meta:non-whitespace-character-count="3759"/>
  </office:meta>
</office:document-meta>
</file>